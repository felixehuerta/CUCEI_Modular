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400F0956524.png" manifest:media-type="image/png"/>
  <manifest:file-entry manifest:full-path="Pictures/100000000000040000000600D49967D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607b" officeooo:paragraph-rsid="0016607b"/>
    </style:style>
    <style:style style:name="P2" style:family="paragraph" style:parent-style-name="Standard">
      <style:paragraph-properties fo:break-before="page"/>
      <style:text-properties officeooo:rsid="0016607b" officeooo:paragraph-rsid="0016607b"/>
    </style:style>
    <style:style style:name="P3" style:family="paragraph" style:parent-style-name="Standard">
      <style:text-properties officeooo:rsid="0016607b" officeooo:paragraph-rsid="001792be"/>
    </style:style>
    <style:style style:name="P4" style:family="paragraph" style:parent-style-name="Standard">
      <style:paragraph-properties fo:break-before="page"/>
      <style:text-properties officeooo:rsid="0016607b" officeooo:paragraph-rsid="001792b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83cm, 0.753cm, 0.228cm, 0.51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58cm, 3.281cm, 0.517cm, 5.2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UESTA DE ARQUITECTURA — MUSEO CUCEI MODULAR (RED UDG)<text:line-break/>=====================================================<text:line-break/>App móvil para visualización de árboles con QR y Realidad Aumentada<text:line-break/>Universidad de Guadalajara — Todos los Centros Universitarios<text:line-break/>=====================================================<text:line-break/><text:line-break/>RESUMEN<text:line-break/>-----------------<text:line-break/>Sistema móvil multiplataforma (Android/iOS) que permite a visitantes, estudiantes y administradores interactuar con los árboles del campus mediante códigos QR. </text:p>
      <text:p text:style-name="P1"/>
      <text:p text:style-name="P1">Los estudiantes proponen imágenes artísticas que, una vez aprobadas por un admin, se visualizan en realidad aumentada sobre el árbol físico usando <text:span text:style-name="T1">ViroReact</text:span>.<text:line-break/><text:line-break/>Alcance: Toda la red de Centros Universitarios de la UDG.</text:p>
      <text:p text:style-name="P1"/>
      <text:p text:style-name="P1">ROLES DE USUARIO<text:line-break/>----------------<text:line-break/>1. VISITANTE<text:line-break/> <text:s text:c="2"/>- Acceso : Cuenta única compartida (ingresa automáticamente, sin acción del usuario)<text:line-break/> <text:s text:c="2"/>- Rol <text:s text:c="3"/>: 1<text:line-break/> <text:s text:c="2"/>- Puede <text:s/>: Escanear QR, ver info del árbol, ver imagen artística en AR<text:line-break/> <text:s text:c="2"/>- No puede: Subir propuestas ni administrar contenido<text:line-break/><text:line-break/>2. ESTUDIANTE<text:line-break/> <text:s text:c="2"/>- Rol <text:s text:c="3"/>: 2<text:line-break/> <text:s text:c="2"/>- Acceso : Correo institucional @alumnos.udg.mx<text:line-break/> <text:s text:c="2"/>- Puede <text:s/>: Todo lo del visitante + enviar propuestas de imagen artística<text:line-break/> <text:s text:c="2"/>- No puede: Aprobar ni publicar imágenes directamente<text:line-break/><text:line-break/>3. ADMIN (uno por Centro Universitario)<text:line-break/> <text:s text:c="2"/>- Rol <text:s text:c="3"/>: 7<text:line-break/> <text:s text:c="2"/>- Acceso : Correo institucional @udg.mx o @alumnos.udg.mx<text:line-break/> <text:s text:c="2"/>- Puede <text:s/>: Todo lo anterior + revisar/aprobar/rechazar propuestas<text:line-break/> <text:s text:c="13"/>+ asignar imágenes aprobadas al árbol correspondiente<text:line-break/> <text:s text:c="13"/>+ agregar y editar árboles de su CU<text:line-break/> <text:s text:c="2"/>- Scope <text:s/>: Solo puede gestionar árboles de su propio CU</text:p>
      <text:p text:style-name="P1"/>
      <text:p text:style-name="P2">ARQUITECTURA GENERAL<text:line-break/>--------------------</text:p>
      <text:p text:style-name="P1"><draw:frame draw:style-name="fr2" draw:name="Imagen1" text:anchor-type="char" svg:x="-0.346cm" svg:y="0.085cm" svg:width="10.003cm" svg:height="9.402cm" draw:z-index="0"><draw:image xlink:href="Pictures/100000000000060000000400F0956524.png" xlink:type="simple" xlink:show="embed" xlink:actuate="onLoad" draw:mime-type="image/png"/></draw:frame></text:p>
      <text:p text:style-name="P3">CAPAS DEL SISTEMA<text:line-break/>-----------------<text:line-break/>1. CLIENTE — App móvil<text:line-break/> <text:s text:c="2"/>Framework <text:s/>: React Native + Expo<text:line-break/> <text:s text:c="2"/>AR <text:s text:c="8"/>: ViroReact<text:line-break/> <text:s text:c="2"/>Navegación : React Navigation<text:line-break/> <text:s text:c="2"/>Auth <text:s text:c="6"/>: JWT almacenado en SecureStore (expo-secure-store)<text:line-break/><text:line-break/>2. AUTENTICACIÓN — Cloudflare Access<text:line-break/> <text:s text:c="2"/>Método <text:s text:c="4"/>: OTP por correo (magic link)<text:line-break/> <text:s text:c="2"/>Dominios <text:s text:c="2"/>: @udg.mx o @alumnos.udg.mx → rol 7 (admin)<text:line-break/> <text:s text:c="15"/>@alumnos.udg.mx → rol 2 (estudiante)<text:line-break/> <text:s text:c="15"/>Sin login → rol 1 (visitante, cuenta fija automática)<text:line-break/> <text:s text:c="2"/>Token <text:s text:c="5"/>: JWT firmado por Cloudflare, validado en el Worker<text:line-break/><text:line-break/>3. API — Cloudflare Worker<text:line-break/> <text:s text:c="2"/>URL base <text:s text:c="2"/>: https://api-cucei.TU-USUARIO.workers.dev<text:line-break/> <text:s text:c="2"/>Rutas <text:s text:c="5"/>:<text:line-break/> <text:s text:c="4"/>GET <text:s/>/arbol/:id <text:s text:c="9"/>→ info pública del árbol (rol &gt;= 1)<text:line-break/> <text:s text:c="4"/>GET <text:s/>/arboles <text:s text:c="11"/>→ listado por CU (rol &gt;= 1)<text:line-break/> <text:s text:c="4"/>POST /propuesta <text:s text:c="9"/>→ enviar imagen (rol &gt;= 2)<text:line-break/> <text:s text:c="4"/>GET <text:s/>/propuestas <text:s text:c="8"/>→ ver pendientes (rol = 7)<text:line-break/> <text:s text:c="4"/>PUT <text:s/>/aprobar/:id <text:s text:c="7"/>→ aprobar propuesta (rol = 7)<text:line-break/> <text:s text:c="4"/>PUT <text:s/>/rechazar/:id <text:s text:c="6"/>→ rechazar propuesta (rol = 7)<text:line-break/> <text:s text:c="4"/>POST /arbol <text:s text:c="13"/>→ crear árbol (rol = 7)<text:line-break/> <text:s text:c="4"/>PUT <text:s/>/arbol/:id <text:s text:c="9"/>→ editar árbol (rol = 7)<text:line-break/><text:soft-page-break/><text:line-break/>4. BASE DE DATOS — Cloudflare D1 (SQLite serverless)<text:line-break/> <text:s text:c="2"/>Costo <text:s text:c="5"/>: Gratis hasta 500 MB<text:line-break/> <text:s text:c="2"/>Tablas <text:s text:c="4"/>: Ver esquema más abajo<text:line-break/><text:line-break/>5. ALMACENAMIENTO — Cloudflare R2<text:line-break/> <text:s text:c="2"/>Costo <text:s text:c="5"/>: Gratis hasta 10 GB<text:line-break/> <text:s text:c="2"/>Carpetas <text:s text:c="2"/>:<text:line-break/> <text:s text:c="4"/>/arboles/aprobadas/ <text:s text:c="5"/>→ imágenes publicadas<text:line-break/> <text:s text:c="4"/>/arboles/pendientes/ <text:s text:c="4"/>→ propuestas en revisión<text:line-break/> <text:s text:c="4"/>/arboles/ar-assets/ <text:s text:c="5"/>→ assets procesados para ViroReact<text:line-break/> <text:s text:c="4"/>/arboles/fotos/ <text:s text:c="9"/>→ foto real del árbol<text:line-break/><text:line-break/>6. REALIDAD AUMENTADA — ViroReact<text:line-break/> <text:s text:c="2"/>Librería <text:s text:c="2"/>: @viro-community/react-viro<text:line-break/> <text:s text:c="2"/>Licencia <text:s text:c="2"/>: Open source (gratis)<text:line-break/> <text:s text:c="2"/>Método <text:s text:c="4"/>: El QR físico actúa como marcador AR (ImageTracker)<text:line-break/> <text:s text:c="2"/>Flujo <text:s text:c="5"/>: Cámara detecta QR → carga asset de R2 →<text:line-break/> <text:s text:c="15"/>superpone imagen artística flotando sobre el árbol<text:line-break/><text:line-break/><text:line-break/>ESQUEMA DE BASE DE DATOS (D1)<text:line-break/>------------------------------<text:line-break/>-- Centros universitarios de la red UDG<text:line-break/>CREATE TABLE centros (<text:line-break/> <text:s/>id <text:s text:c="4"/>TEXT PRIMARY KEY, <text:s text:c="2"/>-- Ej: "CUCEI", "CUCEA", "CUCS"<text:line-break/> <text:s/>nombre TEXT NOT NULL,<text:line-break/> <text:s/>ciudad TEXT<text:line-break/>);<text:line-break/><text:line-break/>-- Árboles registrados<text:line-break/>CREATE TABLE arboles (<text:line-break/> <text:s/>id <text:s text:c="15"/>TEXT PRIMARY KEY, <text:s/>-- Ej: "CUCEI-ARBOL-001"<text:line-break/> <text:s/>centro_id <text:s text:c="8"/>TEXT REFERENCES centros(id),<text:line-break/> <text:s/>nombre_comun <text:s text:c="5"/>TEXT,<text:line-break/> <text:s/>nombre_cientifico TEXT,<text:line-break/> <text:s/>descripcion <text:s text:c="6"/>TEXT,<text:line-break/> <text:s/>ubicacion <text:s text:c="8"/>TEXT,<text:line-break/> <text:s/>coordenadas_lat <text:s text:c="2"/>REAL,<text:line-break/> <text:s/>coordenadas_lng <text:s text:c="2"/>REAL,<text:line-break/> <text:s/>imagen_url <text:s text:c="7"/>TEXT, <text:s text:c="2"/>-- URL en R2 (imagen aprobada)<text:line-break/> <text:s/>ar_asset_url <text:s text:c="5"/>TEXT, <text:s text:c="2"/>-- URL del asset procesado para ViroReact<text:line-break/> <text:s/>imagen_autor <text:s text:c="5"/>TEXT,<text:line-break/> <text:s/>activo <text:s text:c="11"/>INTEGER DEFAULT 1,<text:line-break/> <text:s/>fecha_registro <text:s text:c="3"/>TEXT<text:line-break/>);<text:line-break/><text:line-break/></text:p>
      <text:p text:style-name="P3"><text:soft-page-break/>-- Usuarios registrados<text:line-break/>CREATE TABLE usuarios (<text:line-break/> <text:s/>id <text:s text:c="8"/>TEXT PRIMARY KEY,<text:line-break/> <text:s/>email <text:s text:c="5"/>TEXT UNIQUE,<text:line-break/> <text:s/>rol <text:s text:c="7"/>INTEGER CHECK(rol IN (1, 2, 7)), <text:s/>-- 1=visitante, 2=estudiante, 7=admin<text:line-break/> <text:s/>centro_id <text:s/>TEXT REFERENCES centros(id),<text:line-break/> <text:s/>fecha_alta TEXT<text:line-break/>);<text:line-break/><text:line-break/>-- Propuestas de imagen enviadas por estudiantes<text:line-break/>CREATE TABLE propuestas (<text:line-break/> <text:s/>id <text:s text:c="10"/>INTEGER PRIMARY KEY AUTOINCREMENT,<text:line-break/> <text:s/>arbol_id <text:s text:c="4"/>TEXT REFERENCES arboles(id),<text:line-break/> <text:s/>estudiante_id TEXT REFERENCES usuarios(id),<text:line-break/> <text:s/>imagen_url <text:s text:c="2"/>TEXT, <text:s text:c="7"/>-- URL temporal en R2/pendientes<text:line-break/> <text:s/>estado <text:s text:c="6"/>TEXT CHECK(estado IN ('pendiente','aprobada','rechazada')),<text:line-break/> <text:s/>comentario <text:s text:c="2"/>TEXT, <text:s text:c="7"/>-- Feedback del admin al rechazar<text:line-break/> <text:s/>fecha_envio <text:s/>TEXT,<text:line-break/> <text:s/>fecha_resolucion TEXT<text:line-break/>);<text:line-break/><text:line-break/>-- Registro de escaneos (analíticas)<text:line-break/>CREATE TABLE escaneos (<text:line-break/> <text:s/>id <text:s text:c="8"/>INTEGER PRIMARY KEY AUTOINCREMENT,<text:line-break/> <text:s/>arbol_id <text:s text:c="2"/>TEXT REFERENCES arboles(id),<text:line-break/> <text:s/>usuario_rol TEXT,<text:line-break/> <text:s/>plataforma TEXT,<text:line-break/> <text:s/>timestamp <text:s/>TEXT<text:line-break/>);<text:line-break/><text:line-break/>CLOUDFLARE WORKER — CÓDIGO BASE (src/index.js)<text:line-break/>-----------------------------------------------<text:line-break/> <text:s/>export default {<text:line-break/> <text:s text:c="3"/>async fetch(request, env) {<text:line-break/> <text:s text:c="5"/>const url = new URL(request.url)<text:line-break/> <text:s text:c="5"/>const headers = {<text:line-break/> <text:s text:c="7"/>'Content-Type': 'application/json',<text:line-break/> <text:s text:c="7"/>'Access-Control-Allow-Origin': '*'<text:line-break/> <text:s text:c="5"/>}<text:line-break/><text:line-break/> <text:s text:c="5"/>const jwt = request.headers.get('Authorization')?.replace('Bearer ', '')<text:line-break/> <text:s text:c="5"/>const rol = jwt ? await validarJWT(jwt, env) : 1 <text:s/>// 1=visitante por defecto<text:line-break/><text:line-break/> <text:s text:c="5"/>// GET /arbol/:id — público<text:line-break/> <text:s text:c="5"/>if (url.pathname.startsWith('/arbol/') &amp;&amp; request.method === 'GET') {<text:line-break/> <text:s text:c="7"/>const id = url.pathname.split('/')[2]<text:line-break/> <text:s text:c="7"/>const { results } = await env.DB.prepare(<text:line-break/> <text:s text:c="9"/>'SELECT * FROM arboles WHERE id = ?'<text:line-break/> <text:s text:c="7"/>).bind(id).all()<text:line-break/><text:soft-page-break/> <text:s text:c="7"/>if (!results.length)<text:line-break/> <text:s text:c="9"/>return new Response(JSON.stringify({ error: 'No encontrado' }),<text:line-break/> <text:s text:c="11"/>{ status: 404, headers })<text:line-break/> <text:s text:c="7"/>return new Response(JSON.stringify(results[0]), { headers })<text:line-break/> <text:s text:c="5"/>}<text:line-break/><text:line-break/> <text:s text:c="5"/>// POST /propuesta — solo estudiantes<text:line-break/> <text:s text:c="5"/>if (url.pathname === '/propuesta' &amp;&amp; request.method === 'POST') {<text:line-break/> <text:s text:c="7"/>if (rol &lt; 2) <text:s/>// requiere estudiante(2) o admin(7)<text:line-break/> <text:s text:c="9"/>return new Response(JSON.stringify({ error: 'Sin permiso' }),<text:line-break/> <text:s text:c="11"/>{ status: 403, headers })<text:line-break/> <text:s text:c="7"/>const body = await request.json()<text:line-break/> <text:s text:c="7"/>await env.DB.prepare(<text:line-break/> <text:s text:c="9"/>`INSERT INTO propuestas (arbol_id, estudiante_id, imagen_url, estado, fecha_envio)<text:line-break/> <text:s text:c="10"/>VALUES (?, ?, ?, 'pendiente', ?)`<text:line-break/> <text:s text:c="7"/>).bind(body.arbol_id, body.estudiante_id, body.imagen_url,<text:line-break/> <text:s text:c="9"/>new Date().toISOString()).run()<text:line-break/> <text:s text:c="7"/>return new Response(JSON.stringify({ ok: true }), { headers })<text:line-break/> <text:s text:c="5"/>}<text:line-break/><text:line-break/> <text:s text:c="5"/>// PUT /aprobar/:id — solo admins<text:line-break/> <text:s text:c="5"/>if (url.pathname.startsWith('/aprobar/') &amp;&amp; request.method === 'PUT') {<text:line-break/> <text:s text:c="7"/>if (rol !== 7) <text:s/>// requiere admin<text:line-break/> <text:s text:c="9"/>return new Response(JSON.stringify({ error: 'Sin permiso' }),<text:line-break/> <text:s text:c="11"/>{ status: 403, headers })<text:line-break/> <text:s text:c="7"/>const id = url.pathname.split('/')[2]<text:line-break/> <text:s text:c="7"/>const { arbol_id, imagen_url } = await request.json()<text:line-break/> <text:s text:c="7"/>await env.DB.prepare(<text:line-break/> <text:s text:c="9"/>`UPDATE propuestas SET estado='aprobada',<text:line-break/> <text:s text:c="10"/>fecha_resolucion=? WHERE id=?`<text:line-break/> <text:s text:c="7"/>).bind(new Date().toISOString(), id).run()<text:line-break/> <text:s text:c="7"/>await env.DB.prepare(<text:line-break/> <text:s text:c="9"/>'UPDATE arboles SET imagen_url=? WHERE id=?'<text:line-break/> <text:s text:c="7"/>).bind(imagen_url, arbol_id).run()<text:line-break/> <text:s text:c="7"/>return new Response(JSON.stringify({ ok: true }), { headers })<text:line-break/> <text:s text:c="5"/>}<text:line-break/><text:line-break/> <text:s text:c="5"/>return new Response(JSON.stringify({ error: 'Ruta no válida' }),<text:line-break/> <text:s text:c="7"/>{ status: 404, headers })<text:line-break/> <text:s text:c="3"/>}<text:line-break/> <text:s/>}<text:line-break/><text:line-break/><text:line-break/></text:p>
      <text:p text:style-name="P3"/>
      <text:p text:style-name="P3"/>
      <text:p text:style-name="P4">REALIDAD AUMENTADA CON VIROREACT<text:line-break/>----------------------------------<text:line-break/><text:line-break/>Instalación:<text:line-break/> <text:s/>npm install @viro-community/react-viro<text:line-break/><text:line-break/>Flujo de AR:<text:line-break/> <text:s/>1. La cámara detecta el QR físico en el árbol (ImageTracker)<text:line-break/> <text:s/>2. El Worker devuelve la URL del ar_asset_url del árbol<text:line-break/> <text:s/>3. ViroReact superpone la imagen artística sobre el árbol en tiempo real<text:line-break/><text:line-break/>Código base del componente AR (src/screens/ARScreen.jsx):<text:line-break/><text:line-break/> <text:s/>import { ViroARScene, ViroARImageMarker,<text:line-break/> <text:s text:c="10"/>ViroARTrackingTargets, ViroImage } from '@viro-community/react-viro'<text:line-break/><text:line-break/> <text:s/>ViroARTrackingTargets.createTargets({<text:line-break/> <text:s text:c="3"/>qrArbol: {<text:line-break/> <text:s text:c="5"/>source: { uri: 'URL_DEL_QR_COMO_IMAGEN' },<text:line-break/> <text:s text:c="5"/>orientation: 'Up',<text:line-break/> <text:s text:c="5"/>physicalWidth: 0.1 <text:s text:c="2"/>// 10 cm, tamaño real del QR<text:line-break/> <text:s text:c="3"/>}<text:line-break/> <text:s/>})<text:line-break/><text:line-break/> <text:s/>export default function ARScene({ arAssetUrl }) {<text:line-break/> <text:s text:c="3"/>return (<text:line-break/> <text:s text:c="5"/>&lt;ViroARScene&gt;<text:line-break/> <text:s text:c="7"/>&lt;ViroARImageMarker target="qrArbol"&gt;<text:line-break/> <text:s text:c="9"/>&lt;ViroImage<text:line-break/> <text:s text:c="11"/>source={{ uri: arAssetUrl }}<text:line-break/> <text:s text:c="11"/>scale={[0.5, 0.5, 0.5]}<text:line-break/> <text:s text:c="11"/>position={[0, 0.3, 0]}<text:line-break/> <text:s text:c="9"/>/&gt;<text:line-break/> <text:s text:c="7"/>&lt;/ViroARImageMarker&gt;<text:line-break/> <text:s text:c="5"/>&lt;/ViroARScene&gt;<text:line-break/> <text:s text:c="3"/>)<text:line-break/> <text:s/>}<text:line-break/><text:line-break/>Procesamiento de imagen fija a asset AR:<text:line-break/> <text:s/>- La imagen artística del estudiante se recibe como JPG/PNG normal<text:line-break/> <text:s/>- Al ser aprobada, el Worker activa una función que<text:line-break/> <text:s text:c="3"/>copia la imagen a /ar-assets/ en R2 con las dimensiones<text:line-break/> <text:s text:c="3"/>correctas (recomendado: 1024x1024 px, fondo transparente PNG)<text:line-break/> <text:s/>- La URL de ese asset se guarda en arboles.ar_asset_url<text:line-break/></text:p>
      <text:p text:style-name="P3"/>
      <text:p text:style-name="P4">FLUJO COMPLETO DE APROBACIÓN DE IMÁGENES<text:line-break/>-----------------------------------------</text:p>
      <text:p text:style-name="P3"><draw:frame draw:style-name="fr1" draw:name="Imagen2" text:anchor-type="char" svg:x="-0.118cm" svg:y="0.346cm" svg:width="10.253cm" svg:height="17.704cm" draw:z-index="1"><draw:image xlink:href="Pictures/100000000000040000000600D49967D0.png" xlink:type="simple" xlink:show="embed" xlink:actuate="onLoad" draw:mime-type="image/png"/></draw:frame></text:p>
      <text:p text:style-name="P3"/>
      <text:p text:style-name="P3"/>
      <text:p text:style-name="P4">CONFIGURACIÓN wrangler.toml<text:line-break/>----------------------------<text:line-break/> <text:s/>name = "cucei-api"<text:line-break/> <text:s/>compatibility_date = "2024-01-01"<text:line-break/><text:line-break/> <text:s/>[[d1_databases]]<text:line-break/> <text:s/>binding = "DB"<text:line-break/> <text:s/>database_name = "cucei-db"<text:line-break/> <text:s/>database_id = "TU-ID-D1-AQUI"<text:line-break/><text:line-break/> <text:s/>[[r2_buckets]]<text:line-break/> <text:s/>binding = "BUCKET"<text:line-break/> <text:s/>bucket_name = "cucei-assets"<text:line-break/><text:line-break/> <text:s/>[vars]<text:line-break/> <text:s/>JWT_SECRET = "TU-SECRET-AQUI"<text:line-break/><text:line-break/>SERVICIO EN REACT NATIVE (src/services/treeService.js)<text:line-break/>-------------------------------------------------------<text:line-break/><text:line-break/> <text:s/>const BASE_URL = 'https://api-cucei.TU-USUARIO.workers.dev'<text:line-break/><text:line-break/> <text:s/>async function getHeaders() {<text:line-break/> <text:s text:c="3"/>const token = await SecureStore.getItemAsync('jwt')<text:line-break/> <text:s text:c="3"/>return {<text:line-break/> <text:s text:c="5"/>'Content-Type': 'application/json',<text:line-break/> <text:s text:c="5"/>...(token ? { 'Authorization': `Bearer ${token}` } : {})<text:line-break/> <text:s text:c="3"/>}<text:line-break/> <text:s/>}<text:line-break/><text:line-break/> <text:s/>export async function getArbol(qrUrl) {<text:line-break/> <text:s text:c="3"/>const id = qrUrl.split('/').pop()<text:line-break/> <text:s text:c="3"/>const res = await fetch(`${BASE_URL}/arbol/${id}`,<text:line-break/> <text:s text:c="5"/>{ headers: await getHeaders() })<text:line-break/> <text:s text:c="3"/>if (!res.ok) throw new Error('Árbol no encontrado')<text:line-break/> <text:s text:c="3"/>return res.json()<text:line-break/> <text:s/>}<text:line-break/><text:line-break/> <text:s/>export async function enviarPropuesta(arbolId, imagenUri, estudianteId) {<text:line-break/> <text:s text:c="3"/>const formData = new FormData()<text:line-break/> <text:s text:c="3"/>formData.append('imagen', { uri: imagenUri, type: 'image/jpeg',<text:line-break/> <text:s text:c="5"/>name: 'propuesta.jpg' })<text:line-break/> <text:s text:c="3"/>formData.append('arbol_id', arbolId)<text:line-break/> <text:s text:c="3"/>formData.append('estudiante_id', estudianteId)<text:line-break/> <text:s text:c="3"/>const res = await fetch(`${BASE_URL}/propuesta`,<text:line-break/> <text:s text:c="5"/>{ method: 'POST', body: formData,<text:line-break/> <text:s text:c="7"/>headers: await getHeaders() })<text:line-break/> <text:s text:c="3"/>return res.json()<text:line-break/> <text:s/>}<text:line-break/><text:soft-page-break/>LIBRERÍAS RECOMENDADAS PARA LA APP<text:line-break/>------------------------------------<text:line-break/><text:line-break/> <text:s/>@viro-community/react-viro <text:s text:c="4"/>→ Realidad aumentada<text:line-break/> <text:s/>expo-barcode-scanner <text:s text:c="10"/>→ Escaneo de QR<text:line-break/> <text:s/>expo-secure-store <text:s text:c="13"/>→ Guardar JWT de forma segura<text:line-break/> <text:s/>expo-image-picker <text:s text:c="13"/>→ Seleccionar imagen para propuesta<text:line-break/> <text:s/>@react-navigation/native <text:s text:c="6"/>→ Navegación entre pantallas<text:line-break/> <text:s/>expo-notifications <text:s text:c="12"/>→ Notificaciones al admin<text:line-break/><text:line-break/><text:line-break/>PASOS DE IMPLEMENTACIÓN SUGERIDOS<text:line-break/>-----------------------------------<text:line-break/><text:line-break/> <text:s/>Semana 1 : Setup del proyecto, navegación, pantallas base<text:line-break/> <text:s/>Semana 2 : Escáner QR + integración con Worker + D1<text:line-break/> <text:s/>Semana 3 : Login con Cloudflare Access + roles<text:line-break/> <text:s/>Semana 4 : Flujo de propuesta de imágenes (estudiante + admin)<text:line-break/> <text:s/>Semana 5 : Integración de ViroReact + AR sobre QR<text:line-break/> <text:s/>Semana 6 : Pruebas en campus, correcciones, deploy final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3T19:16:54.311000000</meta:creation-date>
    <dc:date>2026-06-13T19:33:37.435000000</dc:date>
    <meta:editing-duration>PT5M43S</meta:editing-duration>
    <meta:editing-cycles>1</meta:editing-cycles>
    <meta:document-statistic meta:table-count="0" meta:image-count="2" meta:object-count="0" meta:page-count="9" meta:paragraph-count="9" meta:word-count="1322" meta:character-count="11440" meta:non-whitespace-character-count="8659"/>
    <meta:generator>LibreOffice/24.2.1.2$Windows_X86_64 LibreOffice_project/db4def46b0453cc22e2d0305797cf981b68ef5ac</meta:generator>
  </office:meta>
</office:document-meta>
</file>